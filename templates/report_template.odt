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>Fedleave Report Template</text:h>
      <text:p>This is a reusable template for fedleave reports. Replace this text with report content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