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>{{TITLE}}</text:h>
      <text:p/>
      <text:h text:outline-level="2">Executive Summary</text:h>
      <text:p>{{SUMMARY_TABLE}}</text:p>
      <text:p/>
      <text:h text:outline-level="2">Leave Balance Chart</text:h>
      <text:p>{{CHART}}</text:p>
      <text:p/>
      <text:h text:outline-level="2">Notes</text:h>
      <text:p>Report generated by fedleave. Use the CLI for detailed ledger queries and transaction report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