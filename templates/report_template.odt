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SubtitleStyle" style:family="paragraph" style:display-name="SubtitleStyle">
      <style:text-properties fo:font-size="12pt" fo:font-style="italic"/>
    </style:style>
  </office:automatic-styles>
  <office:body>
    <office:text>
      <text:h text:outline-level="1">{{TITLE}}</text:h>
      <text:p text:style-name="SubtitleStyle">{{DATE}}</text:p>
      <text:p text:style-name="SubtitleStyle">{{PREPARED_BY}}</text:p>
      <text:p/>
      <text:h text:outline-level="2">Executive Summary</text:h>
      <text:p>{{SUMMARY_TABLE}}</text:p>
      <text:p/>
      <text:h text:outline-level="2">Leave Balance Chart</text:h>
      <text:p>{{CHART}}</text:p>
      <text:p/>
      <text:h text:outline-level="2">Notes</text:h>
      <text:p>This report includes a summary of core leave balances and an embedded chart. Use the fedleave CLI for detailed ledger and transaction report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